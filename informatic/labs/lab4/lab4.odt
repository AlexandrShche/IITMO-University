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1" svg:font-family="'Times New Roman'"/>
    <style:font-face style:name="monospace" svg:font-family="monospace"/>
    <style:font-face style:name="sans-serif" svg:font-family="sans-serif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language="ru" fo:country="RU" officeooo:paragraph-rsid="00058211" style:font-size-asian="16pt" style:font-size-complex="16pt"/>
    </style:style>
    <style:style style:name="P2" style:family="paragraph" style:parent-style-name="Standard">
      <style:text-properties style:font-name="Times new roman" fo:language="ru" fo:country="RU" officeooo:paragraph-rsid="00058211"/>
    </style:style>
    <style:style style:name="P3" style:family="paragraph" style:parent-style-name="Standard">
      <style:paragraph-properties fo:line-height="100%" fo:text-align="end" style:justify-single-word="false" style:writing-mode="lr-tb"/>
      <style:text-properties style:font-name="Times new roman" fo:font-size="16pt" fo:language="ru" fo:country="RU" officeooo:paragraph-rsid="00058211" style:font-size-asian="16pt" style:font-size-complex="16pt"/>
    </style:style>
    <style:style style:name="P4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6pt" fo:language="ru" fo:country="RU" officeooo:rsid="0004f7fc" officeooo:paragraph-rsid="00058211" style:font-size-asian="16pt" style:font-size-complex="16pt"/>
    </style:style>
    <style:style style:name="P5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6pt" fo:language="ru" fo:country="RU" fo:font-weight="bold" officeooo:rsid="00084940" officeooo:paragraph-rsid="00084940" style:font-size-asian="16pt" style:font-weight-asian="bold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 style:writing-mode="lr-tb"/>
      <style:text-properties style:font-name="Times new roman" fo:language="ru" fo:country="RU" officeooo:paragraph-rsid="00058211"/>
    </style:style>
    <style:style style:name="P7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8pt" fo:language="ru" fo:country="RU" officeooo:paragraph-rsid="00058211" style:font-size-asian="18pt" style:font-size-complex="18pt"/>
    </style:style>
    <style:style style:name="P8" style:family="paragraph" style:parent-style-name="Standard">
      <style:paragraph-properties fo:line-height="100%" fo:text-align="center" style:justify-single-word="false" style:writing-mode="lr-tb"/>
      <style:text-properties fo:language="ru" fo:country="RU" officeooo:paragraph-rsid="00058211"/>
    </style:style>
    <style:style style:name="P9" style:family="paragraph" style:parent-style-name="Standard">
      <style:paragraph-properties fo:line-height="100%" fo:text-align="end" style:justify-single-word="false" style:writing-mode="lr-tb"/>
      <style:text-properties officeooo:paragraph-rsid="00058211"/>
    </style:style>
    <style:style style:name="P10" style:family="paragraph" style:parent-style-name="Standard">
      <style:paragraph-properties fo:line-height="100%" fo:text-align="center" style:justify-single-word="false" style:writing-mode="lr-tb"/>
      <style:text-properties officeooo:paragraph-rsid="00058211"/>
    </style:style>
    <style:style style:name="P11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4pt" fo:language="ru" fo:country="RU" fo:font-weight="normal" officeooo:rsid="00084940" officeooo:paragraph-rsid="0008494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4pt" fo:language="ru" fo:country="RU" fo:font-weight="normal" officeooo:rsid="00087f60" officeooo:paragraph-rsid="00087f60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4pt" fo:language="ru" fo:country="RU" fo:font-weight="normal" officeooo:rsid="000b64be" officeooo:paragraph-rsid="000b64be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4pt" fo:language="ru" fo:country="RU" fo:font-weight="bold" officeooo:rsid="00084940" officeooo:paragraph-rsid="0008494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4pt" fo:language="ru" fo:country="RU" fo:font-style="italic" fo:font-weight="normal" officeooo:rsid="00087f60" officeooo:paragraph-rsid="00087f60" style:font-size-asian="14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4pt" fo:language="ru" fo:country="RU" fo:font-style="normal" style:text-underline-style="none" fo:font-weight="normal" officeooo:rsid="00087f60" officeooo:paragraph-rsid="00087f60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4pt" fo:language="ru" fo:country="RU" fo:font-style="normal" style:text-underline-style="none" fo:font-weight="normal" officeooo:rsid="000b64be" officeooo:paragraph-rsid="00087f60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4pt" fo:language="ru" fo:country="RU" fo:font-style="normal" style:text-underline-style="none" fo:font-weight="normal" officeooo:rsid="000b64be" officeooo:paragraph-rsid="000b64be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4pt" officeooo:paragraph-rsid="000cb711" style:font-size-asian="14pt" style:font-size-complex="14pt"/>
    </style:style>
    <style:style style:name="P20" style:family="paragraph" style:parent-style-name="Standard">
      <style:paragraph-properties fo:line-height="100%" fo:text-align="start" style:justify-single-word="false" style:writing-mode="lr-tb"/>
      <style:text-properties style:font-name="FreeMono" fo:font-size="14pt" fo:language="ru" fo:country="RU" fo:font-style="italic" fo:font-weight="normal" officeooo:rsid="00087f60" officeooo:paragraph-rsid="00087f60" style:font-size-asian="14pt" style:font-style-asian="italic" style:font-weight-asian="normal" style:font-size-complex="14pt" style:font-style-complex="italic" style:font-weight-complex="normal"/>
    </style:style>
    <style:style style:name="P21" style:family="paragraph" style:parent-style-name="Standard">
      <style:paragraph-properties fo:line-height="100%" fo:text-align="start" style:justify-single-word="false" style:writing-mode="lr-tb"/>
      <style:text-properties style:font-name="FreeMono" fo:font-size="14pt" fo:language="ru" fo:country="RU" fo:font-style="normal" style:text-underline-style="none" fo:font-weight="normal" officeooo:rsid="00087f60" officeooo:paragraph-rsid="00087f60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 style:writing-mode="lr-tb"/>
      <style:text-properties style:font-name="FreeSans" fo:font-size="14pt" fo:language="ru" fo:country="RU" fo:font-style="normal" style:text-underline-style="none" fo:font-weight="normal" officeooo:rsid="00087f60" officeooo:paragraph-rsid="00087f60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 style:writing-mode="lr-tb"/>
      <style:text-properties style:font-name="monospace" fo:font-size="14pt" fo:language="ru" fo:country="RU" fo:font-style="normal" style:text-underline-style="none" fo:font-weight="normal" officeooo:rsid="000b64be" officeooo:paragraph-rsid="000b64be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6pt" fo:language="ru" fo:country="RU" officeooo:paragraph-rsid="00058211" style:font-size-asian="16pt" style:font-size-complex="16pt"/>
    </style:style>
    <style:style style:name="P25" style:family="paragraph" style:parent-style-name="Standard">
      <style:paragraph-properties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84940" officeooo:paragraph-rsid="00084940" style:text-blinking="false" fo:background-color="transparent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4pt" fo:language="ru" fo:country="RU" fo:font-style="normal" style:text-underline-style="none" fo:font-weight="normal" officeooo:rsid="000b64be" officeooo:paragraph-rsid="000b64be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4pt" fo:language="ru" fo:country="RU" fo:font-style="normal" style:text-underline-style="none" fo:font-weight="normal" officeooo:rsid="000b64be" officeooo:paragraph-rsid="000cb711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4pt" fo:language="ru" fo:country="RU" fo:font-style="normal" style:text-underline-style="none" fo:font-weight="normal" officeooo:paragraph-rsid="000cb711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4pt" fo:language="ru" fo:country="RU" fo:font-style="normal" style:text-underline-style="none" fo:font-weight="normal" officeooo:rsid="000cb711" officeooo:paragraph-rsid="000cb711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line-height="100%" fo:text-align="start" style:justify-single-word="false" style:writing-mode="lr-tb"/>
      <style:text-properties style:font-name="FreeMono" fo:font-size="14pt" fo:language="ru" fo:country="RU" fo:font-style="normal" style:text-underline-style="none" fo:font-weight="normal" officeooo:rsid="000cb711" officeooo:paragraph-rsid="000cb711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4pt" fo:language="ru" fo:country="RU" fo:font-style="normal" style:text-underline-style="none" fo:font-weight="normal" officeooo:rsid="000f97d0" officeooo:paragraph-rsid="000f97d0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4pt" fo:language="ru" fo:country="RU" fo:font-style="normal" style:text-underline-style="none" fo:font-weight="normal" officeooo:rsid="00131b49" officeooo:paragraph-rsid="00131b49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4pt" fo:language="ru" fo:country="RU" fo:font-style="normal" style:text-underline-style="none" fo:font-weight="bold" officeooo:rsid="000f97d0" officeooo:paragraph-rsid="000f97d0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line-height="100%" fo:text-align="start" style:justify-single-word="false" style:writing-mode="lr-tb"/>
      <style:text-properties style:font-name="FreeMono" fo:font-size="14pt" fo:language="ru" fo:country="RU" fo:font-style="normal" style:text-underline-style="none" fo:font-weight="normal" officeooo:rsid="00131b49" officeooo:paragraph-rsid="00131b49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1" fo:font-size="12pt" fo:language="ru" fo:country="RU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6pt" fo:language="ru" fo:country="RU" fo:font-style="normal" style:text-underline-style="none" fo:font-weight="bold" officeooo:rsid="000f97d0" officeooo:paragraph-rsid="000f97d0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Times new roman" fo:font-size="18pt" style:font-size-asian="18pt" style:font-size-complex="18pt"/>
    </style:style>
    <style:style style:name="T2" style:family="text">
      <style:text-properties style:font-name="Times new roman" fo:font-size="18pt" officeooo:rsid="0004f7fc" style:font-size-asian="18pt" style:font-size-complex="18pt"/>
    </style:style>
    <style:style style:name="T3" style:family="text">
      <style:text-properties style:font-name="Times new roman" fo:font-size="18pt" officeooo:rsid="00058211" style:font-size-asian="18pt" style:font-size-complex="18pt"/>
    </style:style>
    <style:style style:name="T4" style:family="text">
      <style:text-properties style:font-name="Times new roman" fo:font-size="18pt" fo:language="ru" fo:country="RU" style:font-size-asian="18pt" style:font-size-complex="18pt"/>
    </style:style>
    <style:style style:name="T5" style:family="text">
      <style:text-properties style:font-name="Times new roman" fo:font-size="16pt" fo:language="ru" fo:country="RU" style:font-size-asian="16pt" style:font-size-complex="16pt"/>
    </style:style>
    <style:style style:name="T6" style:family="text">
      <style:text-properties style:font-name="Times new roman" fo:font-size="16pt" fo:language="ru" fo:country="RU" officeooo:rsid="001de65f" style:font-size-asian="16pt" style:font-size-complex="16pt"/>
    </style:style>
    <style:style style:name="T7" style:family="text">
      <style:text-properties style:font-name="Times new roman" fo:font-size="16pt" fo:language="ru" fo:country="RU" officeooo:rsid="001eb9b8" style:font-size-asian="16pt" style:font-size-complex="16pt"/>
    </style:style>
    <style:style style:name="T8" style:family="text">
      <style:text-properties style:font-name="Times new roman" fo:font-size="16pt" fo:language="ru" fo:country="RU" officeooo:rsid="001f152d" style:font-size-asian="16pt" style:font-size-complex="16pt"/>
    </style:style>
    <style:style style:name="T9" style:family="text">
      <style:text-properties fo:color="#000011" style:font-name="Times new roman" fo:font-size="18pt" fo:language="ru" fo:country="RU" style:font-name-asian="맑은 고딕" style:font-size-asian="18pt" style:font-size-complex="18pt"/>
    </style:style>
    <style:style style:name="T10" style:family="text">
      <style:text-properties fo:color="#000011" style:font-name="Times new roman" fo:font-size="18pt" fo:language="ru" fo:country="RU" officeooo:rsid="00058211" style:font-name-asian="맑은 고딕" style:font-size-asian="18pt" style:font-size-complex="18pt"/>
    </style:style>
    <style:style style:name="T11" style:family="text">
      <style:text-properties style:font-name="Times New Roman" fo:font-weight="bold" style:font-size-asian="12.25pt" style:font-weight-asian="bold" style:font-weight-complex="bold"/>
    </style:style>
    <style:style style:name="T12" style:family="text">
      <style:text-properties officeooo:rsid="000a6f35"/>
    </style:style>
    <style:style style:name="T13" style:family="text">
      <style:text-properties officeooo:rsid="000b64be"/>
    </style:style>
    <style:style style:name="T14" style:family="text">
      <style:text-properties fo:color="#000000" style:font-name="FreeMono" fo:font-size="12pt" fo:background-color="#ffffff" loext:char-shading-value="0" style:font-size-asian="12pt" style:font-size-complex="12pt"/>
    </style:style>
    <style:style style:name="T15" style:family="text">
      <style:text-properties style:font-name="FreeMono" fo:font-size="12pt" style:font-size-asian="12pt" style:font-size-complex="12pt"/>
    </style:style>
    <style:style style:name="T16" style:family="text"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language="ru" fo:country="RU" fo:font-style="normal" style:text-underline-style="none" fo:font-weight="normal" officeooo:rsid="000b64be" style:font-style-asian="normal" style:font-weight-asian="normal" style:font-style-complex="normal" style:font-weight-complex="normal"/>
    </style:style>
    <style:style style:name="T18" style:family="text">
      <style:text-properties fo:language="ru" fo:country="RU" fo:font-style="normal" style:text-underline-style="none" fo:font-weight="normal" officeooo:rsid="000cb711" style:font-style-asian="normal" style:font-weight-asian="normal" style:font-style-complex="normal" style:font-weight-complex="normal"/>
    </style:style>
    <style:style style:name="T19" style:family="text">
      <style:text-properties fo:language="ru" fo:country="RU" fo:font-style="normal" style:text-underline-style="none" fo:font-weight="normal" officeooo:rsid="000d9d4f" style:font-style-asian="normal" style:font-weight-asian="normal" style:font-style-complex="normal" style:font-weight-complex="normal"/>
    </style:style>
    <style:style style:name="T20" style:family="text">
      <style:text-properties fo:language="ru" fo:country="RU" fo:font-style="normal" style:text-underline-style="none" fo:font-weight="normal" officeooo:rsid="000f97d0" style:font-style-asian="normal" style:font-weight-asian="normal" style:font-style-complex="normal" style:font-weight-complex="normal"/>
    </style:style>
    <style:style style:name="T21" style:family="text">
      <style:text-properties officeooo:rsid="00131b49"/>
    </style:style>
    <style:style style:name="T22" style:family="text">
      <style:text-properties officeooo:rsid="00132b25"/>
    </style:style>
    <style:style style:name="T23" style:family="text">
      <style:text-properties officeooo:rsid="0013e1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Университет ИТМО</text:p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T1">Лабораторная работа по </text:span><text:span text:style-name="T2">информатике</text:span><text:span text:style-name="T1"> №</text:span><text:span text:style-name="T3">4</text:span></text:p>
      <text:p text:style-name="P10"><text:span text:style-name="T9">“</text:span><text:span text:style-name="T10">Регулярные выражения</text:span><text:span text:style-name="T4">” </text:span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вариант <text:span text:style-name="T13">29</text:span></text:p>
      <text:p text:style-name="P9"><text:span text:style-name="T5">Преподаватель: </text:span><text:span text:style-name="T6">Балакшин </text:span><text:span text:style-name="T7">Павел </text:span><text:span text:style-name="T8">Валерьевич</text:span></text:p>
      <text:p text:style-name="P3">Выполнил: Щербаков Александр Валерьевич </text:p>
      <text:p text:style-name="P3">группа РЗ110</text:p>
      <text:p text:style-name="P3"/>
      <text:p text:style-name="P7"/>
      <text:p text:style-name="P4">2020</text:p>
      <text:p text:style-name="P4"/>
      <text:p text:style-name="P5"><text:soft-page-break/>Задание на 70 балов</text:p>
      <text:p text:style-name="P25"><text:bookmark text:name="docs-internal-guid-ead88fb2-7fff-b44d-c67c-3422ca76b2e8"/>Для своей программы придумайте минимум 5 тестов. Каждый тест является отдельной сущностью, передаваемой регулярному выражению для обработки. Для каждого теста необходимо самостоятельно (без использования регулярных выражений) найти правильный ответ. После чего сравнить ответ, выданный программой, и полученный самостоятельно.</text:p>
      <text:p text:style-name="P14"/>
      <text:p text:style-name="P13">29%5 = 4</text:p>
      <text:p text:style-name="P14"/>
      <text:p text:style-name="P11">Анатолий выложил пост с расписанием доп. занятий по информатике, но везде</text:p>
      <text:p text:style-name="P11">перепутал время. Поэтому нужно заменить все вхождения времени на строку (TBD).</text:p>
      <text:p text:style-name="P11">Время – это строка вида HH:MM:SS или HH:MM, в которой HH – число от 00 до 23,</text:p>
      <text:p text:style-name="P11">а MM и SS – число от 00 до 59.</text:p>
      <text:p text:style-name="P11"/>
      <text:p text:style-name="P12">Исходный код программы:</text:p>
      <text:p text:style-name="P12"/>
      <text:p text:style-name="P20">import re</text:p>
      <text:p text:style-name="P20"/>
      <text:p text:style-name="P20">for i in range(5):</text:p>
      <text:p text:style-name="P20"><text:s text:c="4"/>fileName = 'test' + str(i+1) +'.txt' <text:s text:c="3"/></text:p>
      <text:p text:style-name="P20"><text:s text:c="4"/>file = open(fileName, encoding="utf-8") <text:s text:c="3"/></text:p>
      <text:p text:style-name="P20"><text:s text:c="4"/>text = file.read()</text:p>
      <text:p text:style-name="P20"><text:s text:c="4"/>pattern = re.compile(r"(\s)([0,1]\d|2[0-3])(:[0-5]\d){1,2}")</text:p>
      <text:p text:style-name="P20"><text:s text:c="4"/>matches = pattern.finditer(text)</text:p>
      <text:p text:style-name="P20"><text:s text:c="4"/>for j in matches:</text:p>
      <text:p text:style-name="P20"><text:s text:c="8"/>text = re.sub(pattern, " (TBD)", text)</text:p>
      <text:p text:style-name="P20"><text:s text:c="4"/>print(text + '\n')</text:p>
      <text:p text:style-name="P20"><text:s text:c="4"/>file.close()</text:p>
      <text:p text:style-name="P15"/>
      <text:p text:style-name="P16">тесты: </text:p>
      <text:p text:style-name="P16"/>
      <text:p text:style-name="P16">test1</text:p>
      <text:p text:style-name="P16"/>
      <text:p text:style-name="P21">Уважаемые <text:s/>студенты!</text:p>
      <text:p text:style-name="P21">В <text:s/>эту <text:s/>субботу <text:s/>в 15:00 планируется доп. <text:s/>занятие на <text:s/>2 часа.</text:p>
      <text:p text:style-name="P21">То есть в 17:00:01 оно уже точно кончится.</text:p>
      <text:p text:style-name="P22"/>
      <text:p text:style-name="P16">test2</text:p>
      <text:p text:style-name="P16"/>
      <text:p text:style-name="P21">Информация для групп Р3110 - Р3112: 10.12 в главном корпусе петроградского военкомата состоится медосмотр. Начало мероприятия в 10:00.</text:p>
      <text:p text:style-name="P21">Освободиться можно уже к 15:00. </text:p>
      <text:p text:style-name="P16"><text:soft-page-break/></text:p>
      <text:p text:style-name="P16">test3</text:p>
      <text:p text:style-name="P16"/>
      <text:p text:style-name="P21">Команда университа ИТМО заняла первое место, победив в финале со счётом 5:2. Лучше время, поставленное командой: 55.137 с.</text:p>
      <text:p text:style-name="P21">12.11 в 12:00 в актовом зале состоится наградаждение, рассчитанное на 2 часа. То есть в 14:00:01 наверное, закончится.</text:p>
      <text:p text:style-name="P16"/>
      <text:p text:style-name="P16">test4</text:p>
      <text:p text:style-name="P16"/>
      <text:p text:style-name="P21">Биба и боба встретились в 10:15 по московскому времени, а согласно материалам справки из бухгалтерии в 11:12:35 лупа уже получился зарплату и находился на рабочем месте. Это означает, что встретить друг друга в одном анекдоте они не могли даже в <text:span text:style-name="T12">23</text:span>:00 мск. <text:s text:c="3"/></text:p>
      <text:p text:style-name="P16"/>
      <text:p text:style-name="P16">test5</text:p>
      <text:p text:style-name="P16"/>
      <text:p text:style-name="P21">распорядок дня в российской армии:</text:p>
      <text:p text:style-name="P21">06:50 подъем зам.ком. взводов</text:p>
      <text:p text:style-name="P21">07:00 общий подъём</text:p>
      <text:p text:style-name="P21">07:10 - 07:40 утренняя физическая зарядка</text:p>
      <text:p text:style-name="P21">и че-то там дальше </text:p>
      <text:p text:style-name="P21"/>
      <text:p text:style-name="P21">чтобы подключиться 192.168.0.44:2202 надо что-то сделать</text:p>
      <text:p text:style-name="P17"/>
      <text:p text:style-name="P18">Вывод программы, запущенной на этих тестах:</text:p>
      <text:p text:style-name="P18"/>
      <text:p text:style-name="P23"><text:span text:style-name="T14">Уважаемые  студенты!  В  эту  субботу  в (TBD) планируется доп.  занятие на  2 часа. То есть в (TBD) оно уже точно кончится. </text:span><text:span text:style-name="T15"><text:line-break/><text:line-break/>Информация для групп Р3110 - Р3112: 10.12 в главном корпусе петроградского военкомата состоится медосмотр. Начало мероприятия в (TBD). <text:line-break/>Освободиться можно уже к (TBD).<text:line-break/><text:line-break/>Команда университа ИТМО заняла первое место, победив в финале со счётом 5:2. Лучше время, поставленное командой: 55.137 с. <text:line-break/>12.11 в (TBD) в актовом зале состоится наградаждение, рассчитанное на 2 часа. То есть в (TBD) наверное, закончится. <text:line-break/><text:line-break/>Биба и боба встретились в (TBD) по московскому времени, а согласно материалам справки из бухгалтерии в (TBD) лупа уже получился зарплату и находился на рабочем месте. Это означает, что встретить друг друга в одном анекдоте они не могли даже в (TBD) мск.<text:line-break/><text:line-break/>распорядок дня в российской армии: (TBD) подъем зам.ком. взводов (TBD) общий подъём (TBD) - (TBD) утренняя физическая зарядка <text:line-break/>и че-то там дальше<text:line-break/><text:line-break/>чтобы подключиться 192.168.0.44:2202 надо что-то сделать</text:span></text:p>
      <text:p text:style-name="P23"><text:soft-page-break/><text:span text:style-name="T11">Задание на +12 баллов</text:span><text:line-break/></text:p>
      <text:p text:style-name="P18">29 % 30 = 29<text:tab/><text:tab/>29 % 4 = 1</text:p>
      <text:p text:style-name="P18"/>
      <text:p text:style-name="P18">Текст: Ромео и Джульетта<text:tab/><text:tab/></text:p>
      <text:p text:style-name="P27"/>
      <text:p text:style-name="P19"><text:span text:style-name="T17">Н</text:span><text:span text:style-name="T18">айти: </text:span><text:span text:style-name="T16">Все </text:span><text:span text:style-name="T20">восклицательные </text:span><text:span text:style-name="T16">предложения, содержащие хотя бы </text:span><text:span text:style-name="T20">одну запятую</text:span></text:p>
      <text:p text:style-name="P28"/>
      <text:p text:style-name="P29">Исходный код программы:</text:p>
      <text:p text:style-name="P29"/>
      <text:p text:style-name="P30">import re</text:p>
      <text:p text:style-name="P30"/>
      <text:p text:style-name="P30">pattern = re.compile(r"([^.,?!]{1,}(,)([^.?!]){1,})(!)")</text:p>
      <text:p text:style-name="P30">file = open("RomeoAndJuliet.txt")</text:p>
      <text:p text:style-name="P30">text = file.read()</text:p>
      <text:p text:style-name="P30">for sentence in pattern.findall(text):</text:p>
      <text:p text:style-name="P30"><text:s text:c="4"/>print(sentence, '\n')</text:p>
      <text:p text:style-name="P30">file.close()</text:p>
      <text:p text:style-name="P30"/>
      <text:p text:style-name="P33">Задание на +18 баллов</text:p>
      <text:p text:style-name="P33"/>
      <text:p text:style-name="P31">29 % <text:span text:style-name="T23">5</text:span> = <text:span text:style-name="T21">4</text:span></text:p>
      <text:p text:style-name="P31"/>
      <text:p text:style-name="P31">Задание: С помощью регулярного выражения найти в тексте все слова, в которых две гласные стоят подряд, а после этого слова идёт слово, в котором не больше 3 согласных.</text:p>
      <text:p text:style-name="P31"/>
      <text:p text:style-name="P32">Исходный код программы:</text:p>
      <text:p text:style-name="P32"/>
      <text:p text:style-name="P34">import re</text:p>
      <text:p text:style-name="P34"/>
      <text:p text:style-name="P34">pattern = re.compile(r"\b\w*[аАоОуУэЭыЫюЮяЯеЕиИ]{2}\w*\b(?=[.,\[\]\'\";:\s]*[аАоОуУэЭыЫюЮяЯеЕиИъь]*[БбВвГгДдЖжЗзКкЛлМмНнПпРрСсТтФфХхЦцЧчШшЩщ][аАоОуУэЭыЫюЮяЯеЕиИъь]*\b|[.,\[\]\'\";:\s]*[аАоОуУэЭыЫюЮяЯеЕиИъь]*[БбВвГгДдЖжЗзКкЛлМмНнПпРрСсТтФфХхЦцЧчШшЩщ][аАоОуУэЭыЫюЮяЯеЕиИъь]*[БбВвГгДдЖжЗзКкЛлМмНнПпРрСсТтФфХхЦцЧчШшЩщ][аАоОуУэЭыЫюЮяЯеЕъь]*\b|[.,\[\]\'\";:\s]*[аАоОуУэЭыЫюЮяЯеЕъь]*[БбВвГгДдЖжЗзКкЛлМмНнПпРрСсТтФфХхЦцЧчШшЩщ][аАоОуУэЭыЫюЮяЯеЕиИъь]*[БбВвГгДдЖжЗзКкЛлМмНнПпРрСсТтФфХхЦцЧчШшЩщ][аАоОуУэЭыЫюЮяЯеЕиИъь]*[БбВвГгДдЖжЗзКкЛлМмНнПпРрСсТтФфХхЦцЧчШшЩщ][аАоОуУэЭыЫюЮяЯеЕиИъь]*\b)")</text:p>
      <text:p text:style-name="P34"/>
      <text:p text:style-name="P34">for i in range(5):</text:p>
      <text:p text:style-name="P34"><text:s text:c="4"/>fileName = "test1" + str(i+1) +".txt"</text:p>
      <text:p text:style-name="P34"><text:soft-page-break/><text:s text:c="4"/>file = open(fileName)</text:p>
      <text:p text:style-name="P34"><text:s text:c="4"/>text = file.read()</text:p>
      <text:p text:style-name="P34"><text:s text:c="4"/>matches = pattern.findall(text)</text:p>
      <text:p text:style-name="P34"><text:s text:c="4"/>for j in matches:</text:p>
      <text:p text:style-name="P34"><text:s text:c="7"/>print(j)</text:p>
      <text:p text:style-name="P34"><text:s text:c="4"/>print()</text:p>
      <text:p text:style-name="P34"><text:s text:c="4"/>file.close()</text:p>
      <text:p text:style-name="P33"/>
      <text:p text:style-name="P36"><text:bookmark text:name="docs-internal-guid-5c39929d-7fff-5166-af5a-229dfc5ddca4"/>Вывод</text:p>
      <text:p text:style-name="P35">В ходе выполнения лабораторной работы <text:span text:style-name="T22">Я</text:span> разобрался с основными принципами работы регулярных выражений и их реализации на языке программирования Python.</text:p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1" svg:font-family="'Times New Roman'"/>
    <style:font-face style:name="monospace" svg:font-family="monospace"/>
    <style:font-face style:name="sans-serif" svg:font-family="sans-serif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0-11-07T14:24:56.984890756</dc:date>
    <meta:editing-duration>PT5H4M13S</meta:editing-duration>
    <meta:editing-cycles>8</meta:editing-cycles>
    <meta:document-statistic meta:table-count="0" meta:image-count="0" meta:object-count="0" meta:page-count="5" meta:paragraph-count="79" meta:word-count="613" meta:character-count="4796" meta:non-whitespace-character-count="4136"/>
  </office:meta>
</office:document-meta>
</file>